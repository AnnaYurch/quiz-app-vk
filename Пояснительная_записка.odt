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81d01" officeooo:paragraph-rsid="00081d01"/>
    </style:style>
    <style:style style:name="P2" style:family="paragraph" style:parent-style-name="Standard">
      <style:text-properties fo:language="en" fo:country="US" fo:font-weight="bold" officeooo:rsid="00081d01" officeooo:paragraph-rsid="00081d01" style:font-weight-asian="bold" style:font-weight-complex="bold"/>
    </style:style>
    <style:style style:name="P3" style:family="paragraph" style:parent-style-name="Standard">
      <style:text-properties fo:language="ru" fo:country="RU" officeooo:rsid="0004d24c" officeooo:paragraph-rsid="0004d24c"/>
    </style:style>
    <style:style style:name="P4" style:family="paragraph" style:parent-style-name="Standard">
      <style:text-properties officeooo:paragraph-rsid="0004d24c"/>
    </style:style>
    <style:style style:name="P5" style:family="paragraph" style:parent-style-name="Standard">
      <style:text-properties officeooo:paragraph-rsid="00081d01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04d24c" style:font-weight-asian="bold" style:font-weight-complex="bold"/>
    </style:style>
    <style:style style:name="P8" style:family="paragraph" style:parent-style-name="Standard">
      <style:text-properties fo:font-size="16pt" style:font-size-asian="16pt" style:font-size-complex="16pt"/>
    </style:style>
    <style:style style:name="T1" style:family="text">
      <style:text-properties fo:language="ru" fo:country="RU" officeooo:rsid="0004d24c"/>
    </style:style>
    <style:style style:name="T2" style:family="text">
      <style:text-properties officeooo:rsid="00081d01"/>
    </style:style>
    <style:style style:name="T3" style:family="text">
      <style:text-properties fo:language="en" fo:country="US" officeooo:rsid="00081d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Краткая пояснительная записка к проекту MVP веб-приложения для проведения квизов</text:p>
      <text:p text:style-name="Standard"/>
      <text:p text:style-name="P6">Общие сведения</text:p>
      <text:p text:style-name="Standard"/>
      <text:p text:style-name="Standard">Проект представляет собой MVP веб-приложения для проведения интерактивных квизов в реальном времени по модели, близкой к Kahoot. Система ориентирована на два типа пользователей: организатора и участника. Организатор создаёт квиз, добавляет вопросы, запускает игру и управляет показом вопросов. Участники подключаются к активному квизу по коду комнаты, отвечают на вопросы в реальном времени и видят итоговый лидерборд.</text:p>
      <text:p text:style-name="Standard"/>
      <text:p text:style-name="Standard">Цель разработки — получить работоспособный прототип, который демонстрирует полный пользовательский сценарий: регистрация, создание квиза, подключение участников, проведение игры, подсчёт баллов и отображение результатов.</text:p>
      <text:p text:style-name="Standard"/>
      <text:p text:style-name="P6">Обоснование выбора средств разработки</text:p>
      <text:p text:style-name="Standard"/>
      <text:p text:style-name="Standard">Для реализации проекта были выбраны современные и практичные инструменты, подходящие для быстрого создания MVP и последующего масштабирования.</text:p>
      <text:p text:style-name="Standard"/>
      <text:p text:style-name="Standard">Frontend: React + Vite + Tailwind CSS</text:p>
      <text:p text:style-name="Standard">React был выбран как основной фреймворк для построения интерфейса, поскольку он хорошо подходит для создания динамичных одностраничных приложений и управления состоянием экрана в реальном времени. Vite обеспечивает быстрый старт проекта и удобную сборку. Tailwind CSS позволяет быстро собирать аккуратный адаптивный интерфейс без большого объёма ручного CSS-кода.</text:p>
      <text:p text:style-name="Standard"/>
      <text:p text:style-name="Standard">Backend: Node.js + Express</text:p>
      <text:p text:style-name="Standard">Node.js и Express обеспечивают простой и понятный серверный слой на JavaScript, что удобно при использовании единого языка на фронтенде и бэкенде. Это ускоряет разработку, упрощает поддержку и снижает порог входа в проект.</text:p>
      <text:p text:style-name="Standard"/>
      <text:p text:style-name="Standard">Реальное время: Socket.io</text:p>
      <text:p text:style-name="Standard">Для квизов критически важна мгновенная синхронизация между организатором и участниками. Socket.io был выбран для передачи событий в реальном времени: старт квиза, переход к следующему вопросу, отправка ответов, обновление лидерборда и список участников.</text:p>
      <text:p text:style-name="Standard"/>
      <text:p text:style-name="Standard">База данных: Prisma + SQLite</text:p>
      <text:p text:style-name="Standard">Prisma используется как ORM для удобной и безопасной работы с базой данных. SQLite подходит для MVP, так как не требует отдельного сервера БД и позволяет быстро развернуть рабочий прототип. При необходимости архитектуру можно безболезненно перевести на PostgreSQL или другую промышленную СУБД.</text:p>
      <text:p text:style-name="Standard"/>
      <text:p text:style-name="Standard">Авторизация: JWT + bcrypt</text:p>
      <text:p text:style-name="Standard">Для регистрации и входа пользователей используется JWT-аутентификация. Пароли хранятся в хешированном виде с помощью bcrypt, что соответствует базовым требованиям безопасности.</text:p>
      <text:p text:style-name="Standard"/>
      <text:p text:style-name="P6">Основные этапы разработки</text:p>
      <text:p text:style-name="Standard"/>
      <text:p text:style-name="Standard">Этап 1. Проектирование структуры данных</text:p>
      <text:p text:style-name="Standard"><text:soft-page-break/>Сначала была разработана модель базы данных, включающая пользователей, квизы, вопросы, варианты ответов и игровые сессии. На этом этапе были определены сущности, связи между ними и основные поля, необходимые для хранения данных о создании и проведении квиза.</text:p>
      <text:p text:style-name="Standard"/>
      <text:p text:style-name="Standard">Этап 2. Реализация серверной части</text:p>
      <text:p text:style-name="Standard">Был создан backend на Node.js и Express. Реализованы регистрация и авторизация пользователей, защищённые маршруты для организатора, создание квиза, добавление вопросов и получение списка собственных квизов. Также был подготовлен слой для работы с реальным временем через Socket.io.</text:p>
      <text:p text:style-name="Standard"/>
      <text:p text:style-name="Standard">Этап 3. Разработка клиентского интерфейса</text:p>
      <text:p text:style-name="Standard">На фронтенде создано приложение на React с маршрутизацией страниц: главная, вход, кабинет организатора, экран проведения, экран участника, история квизов. Интерфейс адаптирован под сценарии организатора и участника и оформлен с использованием Tailwind CSS.</text:p>
      <text:p text:style-name="Standard"/>
      <text:p text:style-name="Standard">Этап 4. Настройка WebSocket-обмена</text:p>
      <text:p text:style-name="Standard">Для обеспечения режима реального времени были реализованы события подключения к комнате, запуска квиза, показа текущего вопроса, отправки ответа и обновления таблицы лидеров. Это позволило участникам видеть процесс синхронно с действиями организатора.</text:p>
      <text:p text:style-name="Standard"/>
      <text:p text:style-name="Standard">Этап 5. Подсчёт результатов и история участия</text:p>
      <text:p text:style-name="Standard">Добавлена логика начисления баллов, формирования лидерборда и сохранения результатов игровых сессий. Также реализованы упрощённые страницы истории для организатора и участника, где отображаются проведённые и пройденные квизы.</text:p>
      <text:p text:style-name="Standard"/>
      <text:p text:style-name="Standard">Этап 6. Тестирование и сборка MVP</text:p>
      <text:p text:style-name="Standard">После реализации ключевых функций была выполнена проверка работоспособности приложения, исправлены ошибки маршрутизации, взаимодействия сокетов и сборки фронтенда. В результате получен запускаемый MVP-прототип.</text:p>
      <text:p text:style-name="Standard"/>
      <text:p text:style-name="P6">Функциональные возможности прототипа</text:p>
      <text:p text:style-name="Standard"/>
      <text:p text:style-name="Standard">На текущем этапе приложение позволяет:</text:p>
      <text:p text:style-name="Standard"/>
      <text:p text:style-name="Standard">регистрировать и авторизовывать пользователей;</text:p>
      <text:p text:style-name="Standard">разделять роли организатора и участника;</text:p>
      <text:p text:style-name="Standard">создавать квизы и добавлять вопросы;</text:p>
      <text:p text:style-name="Standard">подключать участников к квизу по коду комнаты;</text:p>
      <text:p text:style-name="Standard">запускать квиз и переключать вопросы в реальном времени;</text:p>
      <text:p text:style-name="Standard">принимать ответы участников и начислять баллы;</text:p>
      <text:p text:style-name="Standard">отображать таблицу лидеров;</text:p>
      <text:p text:style-name="P5">сохранять данные об участии и проведённых квизах;</text:p>
      <text:p text:style-name="P5">добавлять вопросы разных типов: текстовые и в виде изображения, с одиночным и множественным выбором правильного ответа.</text:p>
      <text:p text:style-name="Standard"/>
      <text:p text:style-name="P2">Инструкция по запуску</text:p>
      <text:p text:style-name="P1"/>
      <text:p text:style-name="P1">Требования:</text:p>
      <text:p text:style-name="P1">- Node.js 18+ (протестировано на версии 22.15.0)</text:p>
      <text:p text:style-name="P1">- npm 10+</text:p>
      <text:p text:style-name="P1">- Git</text:p>
      <text:p text:style-name="P1"><text:soft-page-break/></text:p>
      <text:p text:style-name="P1">Установка и запуск:</text:p>
      <text:p text:style-name="P1"/>
      <text:p text:style-name="P1">1. Клонируйте репозиторий:</text:p>
      <text:p text:style-name="P1"><text:s text:c="3"/>git clone https://github.com/AnnaYurch/quiz-app-vk.git</text:p>
      <text:p text:style-name="P1"><text:s text:c="3"/>cd quiz-app-vk</text:p>
      <text:p text:style-name="P1"/>
      <text:p text:style-name="P1">2. Установка backend:</text:p>
      <text:p text:style-name="P1"><text:s text:c="3"/>cd backend</text:p>
      <text:p text:style-name="P1"><text:s text:c="3"/>npm install</text:p>
      <text:p text:style-name="P1"><text:s text:c="3"/>npx prisma generate</text:p>
      <text:p text:style-name="P1"><text:s text:c="3"/>npx prisma db push</text:p>
      <text:p text:style-name="P1"/>
      <text:p text:style-name="P1">3. Создайте файл .env в папке backend:</text:p>
      <text:p text:style-name="P1"><text:s text:c="3"/>PORT=3000</text:p>
      <text:p text:style-name="P1"><text:s text:c="3"/>JWT_SECRET=your_secret_key_here</text:p>
      <text:p text:style-name="P1"/>
      <text:p text:style-name="P1">4. Запустите backend (в первом терминале):</text:p>
      <text:p text:style-name="P1"><text:s text:c="3"/>npm run dev</text:p>
      <text:p text:style-name="P1"/>
      <text:p text:style-name="P1">5. Установка frontend (во втором терминале):</text:p>
      <text:p text:style-name="P1"><text:s text:c="3"/>cd frontend</text:p>
      <text:p text:style-name="P1"><text:s text:c="3"/>npm install</text:p>
      <text:p text:style-name="P1"><text:s text:c="3"/>npm run dev</text:p>
      <text:p text:style-name="P1"/>
      <text:p text:style-name="P1">6. Откройте http://localhost:5173 в браузере</text:p>
      <text:p text:style-name="P1"/>
      <text:p text:style-name="P6">Итог</text:p>
      <text:p text:style-name="Standard"/>
      <text:p text:style-name="Standard">В ходе разработки был создан работоспособный MVP веб-приложения для проведения квизов в реальном времени. Выбранный стек технологий позволил быстро реализовать полный пользовательский сценарий и обеспечить основу для дальнейшего развития проекта. Архитектура решения остаётся достаточно гибкой для расширения функциональности: добавления загрузки изображений, детальной статистики, расширенных профилей пользователей, полноценных отчётов и последующего переноса на более мощную инфраструктуру.</text:p>
      <text:p text:style-name="P4"><text:span text:style-name="T1"/></text:p>
      <text:p text:style-name="P7"><text:span text:style-name="T1">Приложение</text:span></text:p>
      <text:p text:style-name="P4">Ссылка на макеты: https://www.figma.com/design/JdR8iuFgMry9E2jfVFtIiA/%D0%9C%D0%BE%D0%B9-%D0%BB%D0%BE%D0%BA%D0%B0%D0%BB%D1%8C%D0%BD%D1%8B%D0%B9-%D1%81%D0%B0%D0%B9%D1%82?node-id=0-1&amp;t=2GKIv6SoNjfZGUdg-1</text:p>
      <text:p text:style-name="P3">Ссылка на репозиторий: https://github.com/AnnaYurch/quiz-app-vk/tree/mai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2T16:30:14.998000000</meta:creation-date>
    <dc:date>2026-06-02T16:41:43.755000000</dc:date>
    <meta:editing-duration>PT11M29S</meta:editing-duration>
    <meta:editing-cycles>4</meta:editing-cycles>
    <meta:generator>LibreOffice/7.4.4.2$Windows_X86_64 LibreOffice_project/85569322deea74ec9134968a29af2df5663baa21</meta:generator>
    <meta:document-statistic meta:table-count="0" meta:image-count="0" meta:object-count="0" meta:page-count="3" meta:paragraph-count="69" meta:word-count="733" meta:character-count="5985" meta:non-whitespace-character-count="5284"/>
  </office:meta>
</office:document-meta>
</file>